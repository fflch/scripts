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gina_1:</text:p>
      <text:p text:style-name="Standard"><text:s text:c="2"/>'#type': wizard_page</text:p>
      <text:p text:style-name="Standard"><text:s text:c="2"/>'#title': 'Página 1'</text:p>
      <text:p text:style-name="Standard"><text:s text:c="2"/>22:</text:p>
      <text:p text:style-name="Standard"><text:s text:c="4"/>'#type': select</text:p>
      <text:p text:style-name="Standard"><text:s text:c="4"/>'#title': Unidade</text:p>
      <text:p text:style-name="Standard"><text:s text:c="4"/>'#options':</text:p>
      <text:p text:style-name="Standard"><text:s text:c="6"/>BBM: 'Biblioteca Brasiliana Guita e José Mindlin'</text:p>
      <text:p text:style-name="Standard"><text:s text:c="6"/>CDCC: 'Centro de Divulgação Científica e Cultural'</text:p>
      <text:p text:style-name="Standard"><text:s text:c="6"/>CEBIMar: 'Centro de Biologia Marinha'</text:p>
      <text:p text:style-name="Standard"><text:s text:c="6"/>CENA: 'Centro de Energia Nuclear na Agricultura'</text:p>
      <text:p text:style-name="Standard"><text:s text:c="6"/>CQ: 'Conjunto das Químicas'</text:p>
      <text:p text:style-name="Standard"><text:s text:c="6"/>EACH: 'Escola de Artes, Ciências e Humanidades'</text:p>
      <text:p text:style-name="Standard"><text:s text:c="6"/>ECA: 'Escola de Comunicações e Artes'</text:p>
      <text:p text:style-name="Standard"><text:s text:c="6"/>EE: 'Escola de Enfermagem'</text:p>
      <text:p text:style-name="Standard"><text:s text:c="6"/>EEFE: 'Escola de Educação Física e Esporte'</text:p>
      <text:p text:style-name="Standard"><text:s text:c="6"/>EEL: 'Escola de Engenharia de Lorena'</text:p>
      <text:p text:style-name="Standard"><text:s text:c="6"/>EESC: 'Escola de Engenharia de São Carlos'</text:p>
      <text:p text:style-name="Standard"><text:s text:c="6"/>EP: 'Escola Politécnica'</text:p>
      <text:p text:style-name="Standard"><text:s text:c="6"/>ESALQ: 'Escola Superior de Agricultura Luiz de Queiroz'</text:p>
      <text:p text:style-name="Standard"><text:s text:c="6"/>FAU: 'Faculdade de Arquitetura e Urbanismo'</text:p>
      <text:p text:style-name="Standard"><text:s text:c="6"/>FD: 'Faculdade de Direito'</text:p>
      <text:p text:style-name="Standard"><text:s text:c="6"/>FDRP: 'Faculdade de Direito de Ribeirão Preto'</text:p>
      <text:p text:style-name="Standard"><text:s text:c="6"/>FE: 'Faculdade de Educação'</text:p>
      <text:p text:style-name="Standard"><text:s text:c="6"/>FEA: 'Faculdade de Economia, Administração e Contabilidade'</text:p>
      <text:p text:style-name="Standard"><text:s text:c="6"/>FFLCH: 'Faculdade de Filosofia, Letras e Ciências Humanas'</text:p>
      <text:p text:style-name="Standard"><text:s text:c="6"/>FM: 'Faculdade de Medicina'</text:p>
      <text:p text:style-name="Standard"><text:s text:c="6"/>FMVZ: 'Faculdade de Medicina Veterinária e Zootecnia'</text:p>
      <text:p text:style-name="Standard"><text:s text:c="6"/>FO: 'Faculdade de Odontologia'</text:p>
      <text:p text:style-name="Standard"><text:s text:c="6"/>FOB/HRAC: 'Faculdade de Odontologia de Bauru'</text:p>
      <text:p text:style-name="Standard"><text:s text:c="6"/>FSP: 'Faculdade de Saúde Pública'</text:p>
      <text:p text:style-name="Standard"><text:s text:c="6"/>FZEA: 'Faculdade de Zootecnia e Engenharia de Alimentos'</text:p>
      <text:p text:style-name="Standard"><text:s text:c="6"/>HU: 'Hospital Universitário'</text:p>
      <text:p text:style-name="Standard"><text:s text:c="6"/>IAG: 'Instituto de Astronomia, Geofísica e Ciências Atmosféricas'</text:p>
      <text:p text:style-name="Standard"><text:s text:c="6"/>IAU: 'Instituto de Arquitetura e Urbanismo'</text:p>
      <text:p text:style-name="Standard"><text:s text:c="6"/>IB: 'Instituto de Biociências'</text:p>
      <text:p text:style-name="Standard"><text:s text:c="6"/>ICB: 'Instituto de Ciências Biomédicas'</text:p>
      <text:p text:style-name="Standard"><text:s text:c="6"/>ICMC: 'Instituto de Ciências Matemáticas e de Computação'</text:p>
      <text:p text:style-name="Standard"><text:s text:c="6"/>IEB: 'Instituto de Estudos Brasileiros'</text:p>
      <text:p text:style-name="Standard"><text:s text:c="6"/>IEE: 'Instituto de Energia e Ambiente'</text:p>
      <text:p text:style-name="Standard"><text:s text:c="6"/>IF: 'Instituto de Física'</text:p>
      <text:p text:style-name="Standard"><text:s text:c="6"/>IFSC: 'Instituto de Física de São Carlos'</text:p>
      <text:p text:style-name="Standard"><text:s text:c="6"/>IGC: 'Instituto de Geociências'</text:p>
      <text:p text:style-name="Standard"><text:s text:c="6"/>IME: 'Instituto de Matemática e Estatística'</text:p>
      <text:p text:style-name="Standard"><text:s text:c="6"/>IMTSP: 'Instituto de Medicina Tropical de São Paulo'</text:p>
      <text:p text:style-name="Standard"><text:s text:c="6"/>IO: 'Instituto Oceanográfico'</text:p>
      <text:p text:style-name="Standard"><text:s text:c="6"/>IP: 'Instituto de Psicologia'</text:p>
      <text:p text:style-name="Standard"><text:s text:c="6"/>IQSC: 'Instituto de Química de São Carlos'</text:p>
      <text:p text:style-name="Standard"><text:s text:c="6"/>IRI: 'Instituto de Relações Internacionais'</text:p>
      <text:p text:style-name="Standard"><text:s text:c="6"/>MAC: 'Museu de Arte Contemporânea'</text:p>
      <text:p text:style-name="Standard"><text:s text:c="6"/>MAE: 'Museu de Arquelogia e Etnologia'</text:p>
      <text:p text:style-name="Standard"><text:s text:c="6"/>MP: 'Museu Paulista'</text:p>
      <text:p text:style-name="Standard"><text:soft-page-break/><text:s text:c="6"/>MZ: 'Museu de Zoologia'</text:p>
      <text:p text:style-name="Standard"><text:s text:c="6"/>PUSP-RP: 'Prefeitura do Campus de Ribeirão Preto'</text:p>
      <text:p text:style-name="Standard"><text:s text:c="6"/>PUSP-SC: 'Prefeitura do Campus de São Carlos'</text:p>
      <text:p text:style-name="Standard"><text:s text:c="6"/>ABCD: 'Agência de Biblioteca e Coleções Digitais'</text:p>
      <text:p text:style-name="Standard"><text:s text:c="2"/>dados_administrativos:</text:p>
      <text:p text:style-name="Standard"><text:s text:c="4"/>'#type': fieldset</text:p>
      <text:p text:style-name="Standard"><text:s text:c="4"/>'#title': 'Dados Administrativos'</text:p>
      <text:p text:style-name="Standard"><text:s text:c="4"/>estrutura_organizacional:</text:p>
      <text:p text:style-name="Standard"><text:s text:c="6"/>'#type': fieldset</text:p>
      <text:p text:style-name="Standard"><text:s text:c="6"/>'#title': 'Estrutura Organizacional'</text:p>
      <text:p text:style-name="Standard"><text:s text:c="6"/>numero_de_assentos_para_usuarios:</text:p>
      <text:p text:style-name="Standard"><text:s text:c="8"/>'#type': number</text:p>
      <text:p text:style-name="Standard"><text:s text:c="8"/>'#title': 'Número de assentos para usuários'</text:p>
      <text:p text:style-name="Standard"><text:s text:c="6"/>area_fisica:</text:p>
      <text:p text:style-name="Standard"><text:s text:c="8"/>'#type': fieldset</text:p>
      <text:p text:style-name="Standard"><text:s text:c="8"/>'#title': 'Área Física'</text:p>
      <text:p text:style-name="Standard"><text:s text:c="8"/>area_fisica_em_m2_:</text:p>
      <text:p text:style-name="Standard"><text:s text:c="10"/>'#type': number</text:p>
      <text:p text:style-name="Standard"><text:s text:c="10"/>'#title': 'Área Física (em m²)'</text:p>
      <text:p text:style-name="Standard"><text:s text:c="2"/>recursos_humanos:</text:p>
      <text:p text:style-name="Standard"><text:s text:c="4"/>'#type': fieldset</text:p>
      <text:p text:style-name="Standard"><text:s text:c="4"/>'#title': 'Recursos Humanos'</text:p>
      <text:p text:style-name="Standard"><text:s text:c="4"/>funcionarios_de_nivel_superior:</text:p>
      <text:p text:style-name="Standard"><text:s text:c="6"/>'#type': number</text:p>
      <text:p text:style-name="Standard"><text:s text:c="6"/>'#title': 'Funcionários de nível Superior'</text:p>
      <text:p text:style-name="Standard"><text:s text:c="4"/>funcionarios_de_nivel_superior_com_especializacao:</text:p>
      <text:p text:style-name="Standard"><text:s text:c="6"/>'#type': number</text:p>
      <text:p text:style-name="Standard"><text:s text:c="6"/>'#title': 'Funcionários de nível Superior com Especialização'</text:p>
      <text:p text:style-name="Standard"><text:s text:c="4"/>funcionarios_de_nivel_superior_com_mestrado:</text:p>
      <text:p text:style-name="Standard"><text:s text:c="6"/>'#type': number</text:p>
      <text:p text:style-name="Standard"><text:s text:c="6"/>'#title': 'Funcionários de nível Superior com Mestrado'</text:p>
      <text:p text:style-name="Standard"><text:s text:c="4"/>funcionarios_de_nivel_superior_com_doutorado:</text:p>
      <text:p text:style-name="Standard"><text:s text:c="6"/>'#type': number</text:p>
      <text:p text:style-name="Standard"><text:s text:c="6"/>'#title': 'Funcionários de nível Superior com Doutorado'</text:p>
      <text:p text:style-name="Standard"><text:s text:c="4"/>funcionarios_de_nivel_tecnico:</text:p>
      <text:p text:style-name="Standard"><text:s text:c="6"/>'#type': number</text:p>
      <text:p text:style-name="Standard"><text:s text:c="6"/>'#title': 'Funcionários de nível Técnico'</text:p>
      <text:p text:style-name="Standard"><text:s text:c="4"/>funcionarios_de_nivel_basico:</text:p>
      <text:p text:style-name="Standard"><text:s text:c="6"/>'#type': number</text:p>
      <text:p text:style-name="Standard"><text:s text:c="6"/>'#title': 'Funcionários de nível Básico'</text:p>
      <text:p text:style-name="Standard">pagina_2:</text:p>
      <text:p text:style-name="Standard"><text:s text:c="2"/>'#type': wizard_page</text:p>
      <text:p text:style-name="Standard"><text:s text:c="2"/>'#title': 'Página 2'</text:p>
      <text:p text:style-name="Standard"><text:s text:c="2"/>'#open': true</text:p>
      <text:p text:style-name="Standard"><text:s text:c="2"/>capacitacao_de_rh:</text:p>
      <text:p text:style-name="Standard"><text:s text:c="4"/>'#type': fieldset</text:p>
      <text:p text:style-name="Standard"><text:s text:c="4"/>'#title': 'Capacitação de RH'</text:p>
      <text:p text:style-name="Standard"><text:s text:c="4"/>eventos_superior:</text:p>
      <text:p text:style-name="Standard"><text:s text:c="6"/>'#type': number</text:p>
      <text:p text:style-name="Standard"><text:s text:c="6"/>'#title': 'Eventos - Superior'</text:p>
      <text:p text:style-name="Standard"><text:s text:c="4"/>eventos_tecnico:</text:p>
      <text:p text:style-name="Standard"><text:s text:c="6"/>'#type': number</text:p>
      <text:p text:style-name="Standard"><text:soft-page-break/><text:s text:c="6"/>'#title': 'Eventos - Técnico'</text:p>
      <text:p text:style-name="Standard"><text:s text:c="4"/>eventos_basico:</text:p>
      <text:p text:style-name="Standard"><text:s text:c="6"/>'#type': number</text:p>
      <text:p text:style-name="Standard"><text:s text:c="6"/>'#title': 'Eventos - Básico'</text:p>
      <text:p text:style-name="Standard"><text:s text:c="4"/>pos_graduacao_especializacao_superior:</text:p>
      <text:p text:style-name="Standard"><text:s text:c="6"/>'#type': number</text:p>
      <text:p text:style-name="Standard"><text:s text:c="6"/>'#title': 'Pós-Graduação - Especialização - Superior'</text:p>
      <text:p text:style-name="Standard"><text:s text:c="4"/>pos_graduacao_especializacao_tecnico:</text:p>
      <text:p text:style-name="Standard"><text:s text:c="6"/>'#type': number</text:p>
      <text:p text:style-name="Standard"><text:s text:c="6"/>'#title': 'Pós-Graduação - Especialização - Técnico'</text:p>
      <text:p text:style-name="Standard"><text:s text:c="4"/>pos_graduacao_especializacao_basico:</text:p>
      <text:p text:style-name="Standard"><text:s text:c="6"/>'#type': number</text:p>
      <text:p text:style-name="Standard"><text:s text:c="6"/>'#title': 'Pós-Graduação - Especialização - Básico'</text:p>
      <text:p text:style-name="Standard"><text:s text:c="4"/>pos_graduacao_mestrado_superior:</text:p>
      <text:p text:style-name="Standard"><text:s text:c="6"/>'#type': number</text:p>
      <text:p text:style-name="Standard"><text:s text:c="6"/>'#title': 'Pós-Graduação - Mestrado - Superior'</text:p>
      <text:p text:style-name="Standard"><text:s text:c="4"/>pos_graduacao_mestrado_tecnico:</text:p>
      <text:p text:style-name="Standard"><text:s text:c="6"/>'#type': number</text:p>
      <text:p text:style-name="Standard"><text:s text:c="6"/>'#title': 'Pós-Graduação - Mestrado - Técnico'</text:p>
      <text:p text:style-name="Standard"><text:s text:c="4"/>pos_graduacao_mestrado_basico:</text:p>
      <text:p text:style-name="Standard"><text:s text:c="6"/>'#type': number</text:p>
      <text:p text:style-name="Standard"><text:s text:c="6"/>'#title': 'Pós-Graduação - Mestrado - Básico'</text:p>
      <text:p text:style-name="Standard"><text:s text:c="4"/>pos_graduacao_doutorado_superior:</text:p>
      <text:p text:style-name="Standard"><text:s text:c="6"/>'#type': number</text:p>
      <text:p text:style-name="Standard"><text:s text:c="6"/>'#title': 'Pós-Graduação - Doutorado - Superior'</text:p>
      <text:p text:style-name="Standard"><text:s text:c="4"/>pos_graduacao_doutorado_tecnico:</text:p>
      <text:p text:style-name="Standard"><text:s text:c="6"/>'#type': number</text:p>
      <text:p text:style-name="Standard"><text:s text:c="6"/>'#title': 'Pós-Graduação - Doutorado - Técnico'</text:p>
      <text:p text:style-name="Standard"><text:s text:c="4"/>pos_graduacao_doutorado_basico:</text:p>
      <text:p text:style-name="Standard"><text:s text:c="6"/>'#type': number</text:p>
      <text:p text:style-name="Standard"><text:s text:c="6"/>'#title': 'Pós-Graduação - Doutorado - Básico'</text:p>
      <text:p text:style-name="Standard"><text:s text:c="4"/>cursos_superior:</text:p>
      <text:p text:style-name="Standard"><text:s text:c="6"/>'#type': number</text:p>
      <text:p text:style-name="Standard"><text:s text:c="6"/>'#title': 'Cursos - Superior'</text:p>
      <text:p text:style-name="Standard"><text:s text:c="4"/>cursos_tecnico:</text:p>
      <text:p text:style-name="Standard"><text:s text:c="6"/>'#type': number</text:p>
      <text:p text:style-name="Standard"><text:s text:c="6"/>'#title': 'Cursos - Técnico'</text:p>
      <text:p text:style-name="Standard"><text:s text:c="4"/>cursos_basico:</text:p>
      <text:p text:style-name="Standard"><text:s text:c="6"/>'#type': number</text:p>
      <text:p text:style-name="Standard"><text:s text:c="6"/>'#title': 'Cursos - Básico'</text:p>
      <text:p text:style-name="Standard">capacitacao_de_usuarios:</text:p>
      <text:p text:style-name="Standard"><text:s text:c="2"/>'#type': fieldset</text:p>
      <text:p text:style-name="Standard"><text:s text:c="2"/>'#title': 'Capacitação de Usuários'</text:p>
      <text:p text:style-name="Standard">cursos_eventos_e_outros_promovidos_pela_biblioteca:</text:p>
      <text:p text:style-name="Standard"><text:s text:c="2"/>'#type': fieldset</text:p>
      <text:p text:style-name="Standard"><text:s text:c="2"/>'#title': 'Cursos/Eventos e Outros Promovidos pela Biblioteca'</text:p>
      <text:p text:style-name="Standard">cursos_eventos_e_outros_promovidos_pela_biblioteca_e_ou_unidade:</text:p>
      <text:p text:style-name="Standard"><text:s text:c="2"/>'#type': managed_file</text:p>
      <text:p text:style-name="Standard"><text:s text:c="2"/>'#title': 'Cursos/Eventos e Outros Promovidos pela Biblioteca e/ou Unidade'</text:p>
      <text:p text:style-name="Standard"><text:s text:c="2"/>'#multiple': true</text:p>
      <text:p text:style-name="Standard"><text:s text:c="2"/>'#required_error': 'Tipos de arquivos permitidos: xls xlsx.'</text:p>
      <text:p text:style-name="Standard"><text:s text:c="2"/>'#file_extensions': 'xls xlsx'</text:p>
      <text:p text:style-name="Standard"><text:soft-page-break/>pagina_3:</text:p>
      <text:p text:style-name="Standard"><text:s text:c="2"/>'#type': wizard_page</text:p>
      <text:p text:style-name="Standard"><text:s text:c="2"/>'#title': 'Página 3'</text:p>
      <text:p text:style-name="Standard"><text:s text:c="2"/>aquisicao:</text:p>
      <text:p text:style-name="Standard"><text:s text:c="4"/>'#type': fieldset</text:p>
      <text:p text:style-name="Standard"><text:s text:c="4"/>'#title': Aquisição</text:p>
      <text:p text:style-name="Standard"><text:s text:c="4"/>livros_e_outros_tipos_de_materiais_compra_:</text:p>
      <text:p text:style-name="Standard"><text:s text:c="6"/>'#type': number</text:p>
      <text:p text:style-name="Standard"><text:s text:c="6"/>'#title': 'Livros e outros tipos de materiais - Compra '</text:p>
      <text:p text:style-name="Standard"><text:s text:c="4"/>livros_e_outros_tipos_de_materiais_doacao:</text:p>
      <text:p text:style-name="Standard"><text:s text:c="6"/>'#type': number</text:p>
      <text:p text:style-name="Standard"><text:s text:c="6"/>'#title': 'Livros e outros tipos de materiais - Doação'</text:p>
      <text:p text:style-name="Standard"><text:s text:c="4"/>periodicos_titulos_correntes_compra:</text:p>
      <text:p text:style-name="Standard"><text:s text:c="6"/>'#type': number</text:p>
      <text:p text:style-name="Standard"><text:s text:c="6"/>'#title': 'Periódicos - Títulos Correntes - Compra'</text:p>
      <text:p text:style-name="Standard"><text:s text:c="4"/>periodicos_titulos_correntes_doacao:</text:p>
      <text:p text:style-name="Standard"><text:s text:c="6"/>'#type': number</text:p>
      <text:p text:style-name="Standard"><text:s text:c="6"/>'#title': 'Periódicos - Títulos Correntes - Doação'</text:p>
      <text:p text:style-name="Standard"><text:s text:c="2"/>periodicos_fasciculos_materiais_cadastrados_no_dedalus_ate_a_pre:</text:p>
      <text:p text:style-name="Standard"><text:s text:c="4"/>'#type': fieldset</text:p>
      <text:p text:style-name="Standard"><text:s text:c="4"/>'#title': Acervo</text:p>
      <text:p text:style-name="Standard"><text:s text:c="4"/>materiaiscadastrados:</text:p>
      <text:p text:style-name="Standard"><text:s text:c="6"/>'#type': number</text:p>
      <text:p text:style-name="Standard"><text:s text:c="6"/>'#title': 'Periódicos (Fascículos) - Materiais cadastrados no DEDALUS até a data'</text:p>
      <text:p text:style-name="Standard"><text:s text:c="4"/>periodicos_fasciculos_materiais_nao_cadastrados_no_dedalus:</text:p>
      <text:p text:style-name="Standard"><text:s text:c="6"/>'#type': number</text:p>
      <text:p text:style-name="Standard"><text:s text:c="6"/>'#title': 'Periódicos (Fascículos) - Materiais não Cadastrados no DEDALUS'</text:p>
      <text:p text:style-name="Standard"><text:s text:c="4"/>backlog_catalogacao_materiais_nao_cadastrados_no_dedalus_livros_:</text:p>
      <text:p text:style-name="Standard"><text:s text:c="6"/>'#type': number</text:p>
      <text:p text:style-name="Standard"><text:s text:c="6"/>'#title': 'Backlog Catalogação - Materiais não Cadastrados no DEDALUS (livros, teses, multimeios e outros tipos) '</text:p>
      <text:p text:style-name="Standard">pagina_4:</text:p>
      <text:p text:style-name="Standard"><text:s text:c="2"/>'#type': wizard_page</text:p>
      <text:p text:style-name="Standard"><text:s text:c="2"/>'#title': 'Página 4'</text:p>
      <text:p text:style-name="Standard"><text:s text:c="2"/>frequencia_de_usuarios_usp:</text:p>
      <text:p text:style-name="Standard"><text:s text:c="4"/>'#type': number</text:p>
      <text:p text:style-name="Standard"><text:s text:c="4"/>'#title': 'Frequência de Usuários - USP'</text:p>
      <text:p text:style-name="Standard"><text:s text:c="2"/>frequencia_de_usuarios_externos_a_usp:</text:p>
      <text:p text:style-name="Standard"><text:s text:c="4"/>'#type': number</text:p>
      <text:p text:style-name="Standard"><text:s text:c="4"/>'#title': 'Frequência de Usuários - Externos à USP'</text:p>
      <text:p text:style-name="Standard"><text:s text:c="2"/>circulacao:</text:p>
      <text:p text:style-name="Standard"><text:s text:c="4"/>'#type': fieldset</text:p>
      <text:p text:style-name="Standard"><text:s text:c="4"/>'#title': Circulação</text:p>
      <text:p text:style-name="Standard"><text:s text:c="4"/>consultas_ao_acervo:</text:p>
      <text:p text:style-name="Standard"><text:s text:c="6"/>'#type': number</text:p>
      <text:p text:style-name="Standard"><text:s text:c="6"/>'#title': 'Consultas ao Acervo'</text:p>
      <text:p text:style-name="Standard"><text:s text:c="4"/>emprestimo_entre_bibliotecas_como_biblioteca_solicitante:</text:p>
      <text:p text:style-name="Standard"><text:s text:c="6"/>'#type': number</text:p>
      <text:p text:style-name="Standard"><text:s text:c="6"/>'#title': 'Empréstimo entre Bibliotecas - Como Biblioteca Solicitante'</text:p>
      <text:p text:style-name="Standard"><text:s text:c="4"/>comutacao_bibliografica:</text:p>
      <text:p text:style-name="Standard"><text:s text:c="6"/>'#type': fieldset</text:p>
      <text:p text:style-name="Standard"><text:s text:c="6"/>'#title': 'Comutação Bibliográfica'</text:p>
      <text:p text:style-name="Standard"><text:soft-page-break/><text:s text:c="4"/>nacional_como_biblioteca_fornecedora_numero_de_pedidos_atendidos:</text:p>
      <text:p text:style-name="Standard"><text:s text:c="6"/>'#type': number</text:p>
      <text:p text:style-name="Standard"><text:s text:c="6"/>'#title': 'Nacional Como Biblioteca Fornecedora - Número de Pedidos Atendidos - Bibliotecas USP'</text:p>
      <text:p text:style-name="Standard"><text:s text:c="4"/>nacional_como_biblioteca_fornecedora_pedidos_atendidos_outros:</text:p>
      <text:p text:style-name="Standard"><text:s text:c="6"/>'#type': number</text:p>
      <text:p text:style-name="Standard"><text:s text:c="6"/>'#title': 'Nacional Como Biblioteca Fornecedora - Pedidos Atendidos - OUTROS'</text:p>
      <text:p text:style-name="Standard"><text:s text:c="4"/>internacional_como_biblioteca_fornecedora_numero_de_pedidos_aten:</text:p>
      <text:p text:style-name="Standard"><text:s text:c="6"/>'#type': number</text:p>
      <text:p text:style-name="Standard"><text:s text:c="6"/>'#title': 'Internacional Como Biblioteca Fornecedora - Número de Pedidos Atendidos'</text:p>
      <text:p text:style-name="Standard"><text:s text:c="4"/>nacional_como_biblioteca_solicitante_numero_de_pedidos_atendidos:</text:p>
      <text:p text:style-name="Standard"><text:s text:c="6"/>'#type': number</text:p>
      <text:p text:style-name="Standard"><text:s text:c="6"/>'#title': 'Nacional Como Biblioteca Solicitante - Número de Pedidos Atendidos - Bibliotecas USP'</text:p>
      <text:p text:style-name="Standard"><text:s text:c="4"/>nacional_como_biblioteca_solicitante_pedidos_atendidos_comut_:</text:p>
      <text:p text:style-name="Standard"><text:s text:c="6"/>'#type': number</text:p>
      <text:p text:style-name="Standard"><text:s text:c="6"/>'#title': 'Nacional Como Biblioteca Solicitante - Pedidos Atendidos - COMUT '</text:p>
      <text:p text:style-name="Standard"><text:s text:c="4"/>nacional_como_biblioteca_solicitante_pedidos_atendidos_outros_:</text:p>
      <text:p text:style-name="Standard"><text:s text:c="6"/>'#type': number</text:p>
      <text:p text:style-name="Standard"><text:s text:c="6"/>'#title': 'Nacional Como Biblioteca Solicitante - Pedidos Atendidos - OUTROS '</text:p>
      <text:p text:style-name="Standard"><text:s text:c="4"/>internacional_como_biblioteca_solicitante_numero_de_pedidos_aten:</text:p>
      <text:p text:style-name="Standard"><text:s text:c="6"/>'#type': number</text:p>
      <text:p text:style-name="Standard"><text:s text:c="6"/>'#title': 'Internacional Como Biblioteca Solicitante - Número de Pedidos Atendidos '</text:p>
      <text:p text:style-name="Standard"><text:s text:c="4"/>assistencia_ao_usuario:</text:p>
      <text:p text:style-name="Standard"><text:s text:c="6"/>'#type': fieldset</text:p>
      <text:p text:style-name="Standard"><text:s text:c="6"/>'#title': 'Assistência ao Usuário'</text:p>
      <text:p text:style-name="Standard"><text:s text:c="6"/>numero_de_assistencias_efetuadas_:</text:p>
      <text:p text:style-name="Standard"><text:s text:c="8"/>'#type': number</text:p>
      <text:p text:style-name="Standard"><text:s text:c="8"/>'#title': 'Número de Assistências Efetuadas '</text:p>
      <text:p text:style-name="Standard"><text:s text:c="4"/>normalizacao_tecnica:</text:p>
      <text:p text:style-name="Standard"><text:s text:c="6"/>'#type': fieldset</text:p>
      <text:p text:style-name="Standard"><text:s text:c="6"/>'#title': 'Normalização Técnica'</text:p>
      <text:p text:style-name="Standard"><text:s text:c="6"/>documento_como_um_todo:</text:p>
      <text:p text:style-name="Standard"><text:s text:c="8"/>'#type': number</text:p>
      <text:p text:style-name="Standard"><text:s text:c="8"/>'#title': 'Documento como um Todo'</text:p>
      <text:p text:style-name="Standard"><text:s text:c="6"/>referencias_bibliograficas:</text:p>
      <text:p text:style-name="Standard"><text:s text:c="8"/>'#type': number</text:p>
      <text:p text:style-name="Standard"><text:s text:c="8"/>'#title': 'Referências Bibliográficas'</text:p>
      <text:p text:style-name="Standard">pagina_5:</text:p>
      <text:p text:style-name="Standard"><text:s text:c="2"/>'#type': wizard_page</text:p>
      <text:p text:style-name="Standard"><text:s text:c="2"/>'#title': 'Página 5'</text:p>
      <text:p text:style-name="Standard"><text:s text:c="2"/>_equipamentos_de_informatica_:</text:p>
      <text:p text:style-name="Standard"><text:s text:c="4"/>'#type': fieldset</text:p>
      <text:p text:style-name="Standard"><text:s text:c="4"/>'#title': ' Equipamentos de Informática '</text:p>
      <text:p text:style-name="Standard"><text:s text:c="4"/>microcomputador_numero_de_equipamentos_para_usuarios:</text:p>
      <text:p text:style-name="Standard"><text:s text:c="6"/>'#type': number</text:p>
      <text:p text:style-name="Standard"><text:s text:c="6"/>'#title': 'Microcomputador - Número de Equipamentos para Usuários'</text:p>
      <text:p text:style-name="Standard"><text:s text:c="4"/>microcomputador_numero_de_equipamentos_para_funcionarios_:</text:p>
      <text:p text:style-name="Standard"><text:s text:c="6"/>'#type': number</text:p>
      <text:p text:style-name="Standard"><text:s text:c="6"/>'#title': 'Microcomputador - Número de Equipamentos para Funcionários '</text:p>
      <text:p text:style-name="Standard"><text:s text:c="4"/>impressora_numero_de_equipamentos_para_usuarios:</text:p>
      <text:p text:style-name="Standard"><text:s text:c="6"/>'#type': number</text:p>
      <text:p text:style-name="Standard"><text:soft-page-break/><text:s text:c="6"/>'#title': 'Impressora - Número de Equipamentos para Usuários'</text:p>
      <text:p text:style-name="Standard"><text:s text:c="4"/>impressora_numero_de_equipamentos_para_funcionarios:</text:p>
      <text:p text:style-name="Standard"><text:s text:c="6"/>'#type': number</text:p>
      <text:p text:style-name="Standard"><text:s text:c="6"/>'#title': 'Impressora - Número de Equipamentos para Funcionários'</text:p>
      <text:p text:style-name="Standard"><text:s text:c="4"/>scanner_numero_de_equipamentos_para_usuarios_:</text:p>
      <text:p text:style-name="Standard"><text:s text:c="6"/>'#type': number</text:p>
      <text:p text:style-name="Standard"><text:s text:c="6"/>'#title': 'Scanner - Número de Equipamentos para Usuários '</text:p>
      <text:p text:style-name="Standard"><text:s text:c="4"/>scanner_numero_de_equipamentos_para_funcionarios:</text:p>
      <text:p text:style-name="Standard"><text:s text:c="6"/>'#type': number</text:p>
      <text:p text:style-name="Standard"><text:s text:c="6"/>'#title': 'Scanner - Número de Equipamentos para Funcionários'</text:p>
      <text:p text:style-name="Standard"><text:s text:c="4"/>outros_numero_de_equipamentos_para_usuarios:</text:p>
      <text:p text:style-name="Standard"><text:s text:c="6"/>'#type': number</text:p>
      <text:p text:style-name="Standard"><text:s text:c="6"/>'#title': 'Outros - Número de Equipamentos para Usuários'</text:p>
      <text:p text:style-name="Standard"><text:s text:c="4"/>outros_numero_de_equipamentos_para_funcionarios_:</text:p>
      <text:p text:style-name="Standard"><text:s text:c="6"/>'#type': number</text:p>
      <text:p text:style-name="Standard"><text:s text:c="6"/>'#title': 'Outros - Número de Equipamentos para Funcionários '</text:p>
      <text:p text:style-name="Standard">pagina_6:</text:p>
      <text:p text:style-name="Standard"><text:s text:c="2"/>'#type': wizard_page</text:p>
      <text:p text:style-name="Standard"><text:s text:c="2"/>'#title': 'Página 6'</text:p>
      <text:p text:style-name="Standard"><text:s text:c="2"/>outras_informacoes:</text:p>
      <text:p text:style-name="Standard"><text:s text:c="4"/>'#type': fieldset</text:p>
      <text:p text:style-name="Standard"><text:s text:c="4"/>'#title': 'Outras informações'</text:p>
      <text:p text:style-name="Standard"><text:s text:c="4"/>bases_de_dados:</text:p>
      <text:p text:style-name="Standard"><text:s text:c="6"/>'#type': textarea</text:p>
      <text:p text:style-name="Standard"><text:s text:c="6"/>'#title': 'Bases de dados'</text:p>
      <text:p text:style-name="Standard"><text:s text:c="2"/>publicacoes:</text:p>
      <text:p text:style-name="Standard"><text:s text:c="4"/>'#type': fieldset</text:p>
      <text:p text:style-name="Standard"><text:s text:c="4"/>'#title': Publicações</text:p>
      <text:p text:style-name="Standard"><text:s text:c="4"/>publicacoes_da_biblioteca:</text:p>
      <text:p text:style-name="Standard"><text:s text:c="6"/>'#type': textarea</text:p>
      <text:p text:style-name="Standard"><text:s text:c="6"/>'#title': 'Publicações da Biblioteca'</text:p>
      <text:p text:style-name="Standard"><text:s text:c="4"/>publicacoes_oficiais_da_unidade_com_participacao_da_biblioteca:</text:p>
      <text:p text:style-name="Standard"><text:s text:c="6"/>'#type': textarea</text:p>
      <text:p text:style-name="Standard"><text:s text:c="6"/>'#title': 'Publicações Oficiais da Unidade com Participação da Biblioteca'</text:p>
      <text:p text:style-name="Standard"><text:s text:c="4"/>eventos:</text:p>
      <text:p text:style-name="Standard"><text:s text:c="6"/>'#type': textarea</text:p>
      <text:p text:style-name="Standard"><text:s text:c="6"/>'#title': Eventos</text:p>
      <text:p text:style-name="Standard"><text:s text:c="4"/>projetos:</text:p>
      <text:p text:style-name="Standard"><text:s text:c="6"/>'#type': textarea</text:p>
      <text:p text:style-name="Standard"><text:s text:c="6"/>'#title': Projetos</text:p>
      <text:p text:style-name="Standard"><text:s text:c="4"/>atividades_ligadas_a_graduacao_pos_graduacao_e_pesquisa:</text:p>
      <text:p text:style-name="Standard"><text:s text:c="6"/>'#type': textarea</text:p>
      <text:p text:style-name="Standard"><text:s text:c="6"/>'#title': 'Atividades ligadas à Graduação, Pós-Graduação e Pesquisa'</text:p>
      <text:p text:style-name="Standard"><text:s text:c="4"/>atividades_ligadas_a_cultura_e_extensao:</text:p>
      <text:p text:style-name="Standard"><text:s text:c="6"/>'#type': textarea</text:p>
      <text:p text:style-name="Standard"><text:s text:c="6"/>'#title': 'Atividades ligadas à Cultura e Extensão'</text:p>
      <text:p text:style-name="Standard"><text:s text:c="2"/>internet:</text:p>
      <text:p text:style-name="Standard"><text:s text:c="4"/>'#type': fieldset</text:p>
      <text:p text:style-name="Standard"><text:s text:c="4"/>'#title': Internet</text:p>
      <text:p text:style-name="Standard"><text:s text:c="4"/>oferece_servicos_pela_internet_:</text:p>
      <text:p text:style-name="Standard"><text:s text:c="6"/>'#type': select</text:p>
      <text:p text:style-name="Standard"><text:s text:c="6"/>'#title': 'Oferece serviços pela internet?'</text:p>
      <text:p text:style-name="Standard"><text:soft-page-break/><text:s text:c="6"/>'#options':</text:p>
      <text:p text:style-name="Standard"><text:s text:c="8"/>Sim: Sim</text:p>
      <text:p text:style-name="Standard"><text:s text:c="8"/>Não: Não</text:p>
      <text:p text:style-name="Standard"><text:s text:c="4"/>possui_rede_sem_fio_:</text:p>
      <text:p text:style-name="Standard"><text:s text:c="6"/>'#type': select</text:p>
      <text:p text:style-name="Standard"><text:s text:c="6"/>'#title': 'Possui rede sem fio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pagina_7:</text:p>
      <text:p text:style-name="Standard"><text:s text:c="2"/>'#type': wizard_page</text:p>
      <text:p text:style-name="Standard"><text:s text:c="2"/>'#title': 'Página 7'</text:p>
      <text:p text:style-name="Standard"><text:s text:c="2"/>acessibilidade:</text:p>
      <text:p text:style-name="Standard"><text:s text:c="4"/>'#type': fieldset</text:p>
      <text:p text:style-name="Standard"><text:s text:c="4"/>'#title': Acessibilidade</text:p>
      <text:p text:style-name="Standard"><text:s text:c="4"/>oferece_condicoes_de_acessibilidade_:</text:p>
      <text:p text:style-name="Standard"><text:s text:c="6"/>'#type': select</text:p>
      <text:p text:style-name="Standard"><text:s text:c="6"/>'#title': 'Oferece condições de acessibilidade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atendente_treinado_na_lingua_brasileira_de_sinais_libras_:</text:p>
      <text:p text:style-name="Standard"><text:s text:c="6"/>'#type': select</text:p>
      <text:p text:style-name="Standard"><text:s text:c="6"/>'#title': 'Atendente treinado na Língua Brasileira de Sinais (Libras)?'</text:p>
      <text:p text:style-name="Standard"><text:s text:c="6"/>'#options':</text:p>
      <text:p text:style-name="Standard"><text:s text:c="8"/>Sim: Sim</text:p>
      <text:p text:style-name="Standard"><text:s text:c="8"/>Não: 'N'</text:p>
      <text:p text:style-name="Standard"><text:s text:c="2"/>acessibilidade_arquitetonica_ou_fisica:</text:p>
      <text:p text:style-name="Standard"><text:s text:c="4"/>'#type': fieldset</text:p>
      <text:p text:style-name="Standard"><text:s text:c="4"/>'#title': 'Acessibilidade Arquitetônica ou Física'</text:p>
      <text:p text:style-name="Standard"><text:s text:c="4"/>possui_banheiros_e_lavabos_acessiveis_:</text:p>
      <text:p text:style-name="Standard"><text:s text:c="6"/>'#type': select</text:p>
      <text:p text:style-name="Standard"><text:s text:c="6"/>'#title': 'Possui banheiros e lavabos acessíveis?'</text:p>
      <text:p text:style-name="Standard"><text:s text:c="6"/>'#options':</text:p>
      <text:p text:style-name="Standard"><text:s text:c="8"/>Sim: s</text:p>
      <text:p text:style-name="Standard"><text:s text:c="8"/>Não: 'n'</text:p>
      <text:p text:style-name="Standard"><text:s text:c="4"/>possui_bebedouros_acessiveis_:</text:p>
      <text:p text:style-name="Standard"><text:s text:c="6"/>'#type': select</text:p>
      <text:p text:style-name="Standard"><text:s text:c="6"/>'#title': 'Possui bebedouros acessíveis?'</text:p>
      <text:p text:style-name="Standard"><text:s text:c="6"/>'#options':</text:p>
      <text:p text:style-name="Standard"><text:s text:c="8"/>Sim: s</text:p>
      <text:p text:style-name="Standard"><text:s text:c="8"/>Não: 'n'</text:p>
      <text:p text:style-name="Standard"><text:s text:c="4"/>possui_entrada_saida_com_vao_livre_acessivel_para_a_circulacao_d:</text:p>
      <text:p text:style-name="Standard"><text:s text:c="6"/>'#type': select</text:p>
      <text:p text:style-name="Standard"><text:s text:c="6"/>'#title': 'Possui entrada/saída com vão livre acessível para a circulação de pessoas com deficiência e mobilidade reduzida?'</text:p>
      <text:p text:style-name="Standard"><text:s text:c="6"/>'#options':</text:p>
      <text:p text:style-name="Standard"><text:s text:c="8"/>Sim: s</text:p>
      <text:p text:style-name="Standard"><text:s text:c="8"/>Não: 'n'</text:p>
      <text:p text:style-name="Standard"><text:s text:c="4"/>possui_equipamento_eletromecanico_elevadores_esteiras_rolantes_e:</text:p>
      <text:p text:style-name="Standard"><text:s text:c="6"/>'#type': select</text:p>
      <text:p text:style-name="Standard"><text:s text:c="6"/>'#title': 'Possui equipamento eletromecânico (elevadores, esteiras rolantes, entre outros)?'</text:p>
      <text:p text:style-name="Standard"><text:soft-page-break/><text:s text:c="6"/>'#options':</text:p>
      <text:p text:style-name="Standard"><text:s text:c="8"/>Sim: s</text:p>
      <text:p text:style-name="Standard"><text:s text:c="8"/>Não: 'n'</text:p>
      <text:p text:style-name="Standard"><text:s text:c="4"/>possui_espaco_para_atendimento_acessivel_:</text:p>
      <text:p text:style-name="Standard"><text:s text:c="6"/>'#type': select</text:p>
      <text:p text:style-name="Standard"><text:s text:c="6"/>'#title': 'Possui espaço para atendimento acessível?'</text:p>
      <text:p text:style-name="Standard"><text:s text:c="6"/>'#options':</text:p>
      <text:p text:style-name="Standard"><text:s text:c="8"/>Sim: s</text:p>
      <text:p text:style-name="Standard"><text:s text:c="8"/>Não: 'n'</text:p>
      <text:p text:style-name="Standard"><text:s text:c="4"/>possui_mobiliario_acessivel_:</text:p>
      <text:p text:style-name="Standard"><text:s text:c="6"/>'#type': select</text:p>
      <text:p text:style-name="Standard"><text:s text:c="6"/>'#title': 'Possui mobiliário acessível?'</text:p>
      <text:p text:style-name="Standard"><text:s text:c="6"/>'#options':</text:p>
      <text:p text:style-name="Standard"><text:s text:c="8"/>Sim: sim</text:p>
      <text:p text:style-name="Standard"><text:s text:c="8"/>Não: 'n'</text:p>
      <text:p text:style-name="Standard"><text:s text:c="4"/>possui_rampa_de_acesso_com_corrimao_:</text:p>
      <text:p text:style-name="Standard"><text:s text:c="6"/>'#type': select</text:p>
      <text:p text:style-name="Standard"><text:s text:c="6"/>'#title': 'Possui rampa de acesso com corrimão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possui_sinalizacao_tatil_:</text:p>
      <text:p text:style-name="Standard"><text:s text:c="6"/>'#type': select</text:p>
      <text:p text:style-name="Standard"><text:s text:c="6"/>'#title': 'Possui sinalização tátil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possui_sinalizacao_visual_:</text:p>
      <text:p text:style-name="Standard"><text:s text:c="6"/>'#type': select</text:p>
      <text:p text:style-name="Standard"><text:s text:c="6"/>'#title': 'Possui sinalização visual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possui_sinalizacao_sonora_:</text:p>
      <text:p text:style-name="Standard"><text:s text:c="6"/>'#type': select</text:p>
      <text:p text:style-name="Standard"><text:s text:c="6"/>'#title': 'Possui sinalização sonora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possui_ambientes_acessiveis_para_a_movimentacao_deslocamento_cir:</text:p>
      <text:p text:style-name="Standard"><text:s text:c="6"/>'#type': select</text:p>
      <text:p text:style-name="Standard"><text:s text:c="6"/>'#title': 'Possui ambientes acessíveis para a movimentação/deslocamento/circulação de pessoas com deficiência e mobilidade reduzida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2"/>acessibilidade_de_conteudo:</text:p>
      <text:p text:style-name="Standard"><text:s text:c="4"/>'#type': fieldset</text:p>
      <text:p text:style-name="Standard"><text:s text:c="4"/>'#title': 'Acessibilidade de conteúdo'</text:p>
      <text:p text:style-name="Standard"><text:s text:c="4"/>possui_plano_de_aquisicao_gradual_de_acervo_bibliografico_dos_co:</text:p>
      <text:p text:style-name="Standard"><text:s text:c="6"/>'#type': select</text:p>
      <text:p text:style-name="Standard"><text:soft-page-break/><text:s text:c="6"/>'#title': 'Possui plano de aquisição gradual de acervo bibliográfico dos conteúdos básicos em formato acessível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possui_acervo_em_formato_acessivel_para_pessoas_com_deficiencia_:</text:p>
      <text:p text:style-name="Standard"><text:s text:c="6"/>'#type': select</text:p>
      <text:p text:style-name="Standard"><text:s text:c="6"/>'#title': 'Possui acervo em formato acessível para pessoas com deficiência visual (cegueira e baixa visão)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possui_sitios_plataformas_e_programas_acessiveis_para_que_pessoa:</text:p>
      <text:p text:style-name="Standard"><text:s text:c="6"/>'#type': select</text:p>
      <text:p text:style-name="Standard"><text:s text:c="6"/>'#title': 'Possui sítios, plataformas e programas acessíveis para que pessoas com deficiência naveguem e utilizem os serviços oferecidos com autonomia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2"/>acessibilidade_tecnologica:</text:p>
      <text:p text:style-name="Standard"><text:s text:c="4"/>'#type': fieldset</text:p>
      <text:p text:style-name="Standard"><text:s text:c="4"/>'#title': 'Acessibilidade Tecnológica'</text:p>
      <text:p text:style-name="Standard"><text:s text:c="4"/>disponibiliza_servicos_de_impressao_em_braille_:</text:p>
      <text:p text:style-name="Standard"><text:s text:c="6"/>'#type': select</text:p>
      <text:p text:style-name="Standard"><text:s text:c="6"/>'#title': 'Disponibiliza serviços de impressão em Braille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disponibiliza_leitores_de_tela_para_pessoas_com_deficiencia_visu:</text:p>
      <text:p text:style-name="Standard"><text:s text:c="6"/>'#type': select</text:p>
      <text:p text:style-name="Standard"><text:s text:c="6"/>'#title': 'Disponibiliza leitores de tela para pessoas com deficiência visual (cegueira e baixa visão)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<text:s text:c="4"/>_disponibiliza_teclado_virtual_:</text:p>
      <text:p text:style-name="Standard"><text:s text:c="6"/>'#type': select</text:p>
      <text:p text:style-name="Standard"><text:s text:c="6"/>'#title': ' <text:s/>Disponibiliza teclado virtual?'</text:p>
      <text:p text:style-name="Standard"><text:s text:c="6"/>'#options':</text:p>
      <text:p text:style-name="Standard"><text:s text:c="8"/>Sim: sim</text:p>
      <text:p text:style-name="Standard"><text:s text:c="8"/>Não: não</text:p>
      <text:p text:style-name="Standard">captcha:</text:p>
      <text:p text:style-name="Standard"><text:s text:c="2"/>'#type': captcha</text:p>
      <text:p text:style-name="Standard"><text:s text:c="2"/>'#captcha_type': captcha/M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03:09.655667970</meta:creation-date>
    <dc:date>2024-08-14T15:04:00.122514023</dc:date>
    <meta:editing-duration>PT50S</meta:editing-duration>
    <meta:editing-cycles>1</meta:editing-cycles>
    <meta:document-statistic meta:table-count="0" meta:image-count="0" meta:object-count="0" meta:page-count="9" meta:paragraph-count="450" meta:word-count="1434" meta:character-count="16148" meta:non-whitespace-character-count="12813"/>
    <meta:generator>LibreOffice/7.4.7.2$Linux_X86_64 LibreOffice_project/40$Build-2</meta:generator>
  </office:meta>
</office:document-meta>
</file>